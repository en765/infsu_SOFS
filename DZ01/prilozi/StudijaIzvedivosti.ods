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ptos Narrow" svg:font-family="'Aptos Narrow'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6181in"/>
    </style:style>
    <style:style style:name="co2" style:family="table-column">
      <style:table-column-properties fo:break-before="auto" style:column-width="1.3402in"/>
    </style:style>
    <style:style style:name="co3" style:family="table-column">
      <style:table-column-properties fo:break-before="auto" style:column-width="1.3335in"/>
    </style:style>
    <style:style style:name="co4" style:family="table-column">
      <style:table-column-properties fo:break-before="auto" style:column-width="0.666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008in" fo:break-before="auto" style:use-optimal-row-height="true"/>
    </style:style>
    <style:style style:name="ro3" style:family="table-row">
      <style:table-row-properties style:row-height="0.2016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6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wrap-option="wrap" style:vertical-align="middle"/>
    </style:style>
    <style:style style:name="ce4" style:family="table-cell" style:parent-style-name="Default" style:data-style-name="N0">
      <style:table-cell-properties fo:wrap-option="wrap" style:vertical-align="middle"/>
      <style:text-properties fo:font-weight="bold" style:font-weight-asian="bold" style:font-weight-complex="bold"/>
    </style:style>
    <style:style style:name="gr1" style:family="graphic">
      <style:graphic-properties draw:stroke="solid" svg:stroke-width="0.0102in" svg:stroke-color="#bcbcbc" svg:stroke-opacity="100%" draw:fill="solid" draw:fill-color="#ffffff" draw:opacity="100%" draw:textarea-horizontal-align="left" draw:textarea-vertical-align="top" draw:auto-grow-height="false" draw:auto-grow-width="false" fo:padding-top="0.05in" fo:padding-bottom="0.05in" fo:padding-left="0.1in" fo:padding-right="0.1in" fo:wrap-option="wrap"/>
      <style:paragraph-properties style:font-independent-line-spacing="false"/>
    </style:style>
    <style:style style:name="P1" style:family="paragraph">
      <style:paragraph-properties fo:margin-left="0in" fo:margin-right="0in" fo:margin-top="0in" fo:margin-bottom="0in" fo:line-height="100%" fo:text-indent="0in" style:punctuation-wrap="hanging">
        <style:tab-stops/>
      </style:paragraph-properties>
    </style:style>
    <style:style style:name="P2" style:family="paragraph">
      <loext:graphic-properties draw:fill="solid" draw:fill-color="#ffffff" draw:opacity="100%"/>
      <style:paragraph-properties style:writing-mode="lr-tb" style:font-independent-line-spacing="false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ptos Narrow" fo:font-size="11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size-asian="11pt" style:font-style-asian="normal" style:font-weight-asian="normal" style:font-size-complex="11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ptos Narrow" fo:font-size="11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List1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4" table:number-columns-repeated="16379" table:default-cell-style-name="ce1"/>
        <table:table-row table:style-name="ro1">
          <table:table-cell>
            <draw:frame draw:z-index="0" draw:name="TekstniOkvir 1" draw:style-name="gr1" draw:text-style-name="P2" svg:width="9.278in" svg:height="0.3055in" svg:x="0in" svg:y="0.0138in">
              <draw:text-box>
                <text:p text:style-name="P1"><text:span text:style-name="T1">Za rješavanje problema organizacije fitness studija razmatrane su tri moguće alternative:</text:span></text:p>
              </draw:text-box>
            </draw:frame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>
            <draw:frame draw:z-index="1" draw:name="TekstniOkvir 2" draw:style-name="gr1" draw:text-style-name="P2" svg:width="11.111in" svg:height="0.6528in" svg:x="0in" svg:y="0.1252in">
              <draw:text-box>
                <text:p text:style-name="P1"><text:span text:style-name="T1">Alternativa A - Ručno vođenje evidencije (tablice i papir)</text:span><text:span text:style-name="T1"><text:line-break/></text:span><text:span text:style-name="T1">Fitness studio nastavlja voditi evidenciju članova, termina i uplata ručno ili pomoću jednostavnih tablica (npr. Excel).</text:span></text:p>
              </draw:text-box>
            </draw:frame>
          </table:table-cell>
          <table:table-cell table:number-columns-repeated="16383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>
            <draw:frame draw:z-index="2" draw:name="TekstniOkvir 4" draw:style-name="gr1" draw:text-style-name="P2" svg:width="11.0417in" svg:height="0.639in" svg:x="0.0138in" svg:y="0.0071in">
              <draw:text-box>
                <text:p text:style-name="P1"><text:span text:style-name="T1">Alternativa B - Korištenje postojećeg komercijalnog softvera</text:span><text:span text:style-name="T1"><text:line-break/></text:span><text:span text:style-name="T1">Fitness studio koristi već postojeće programsko rješenje za upravljanje fitness studijima koje se plaća putem pretplate.</text:span></text:p>
              </draw:text-box>
            </draw:frame>
          </table:table-cell>
          <table:table-cell table:number-columns-repeated="16383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>
            <draw:frame draw:z-index="3" draw:name="TekstniOkvir 5" draw:style-name="gr1" draw:text-style-name="P2" svg:width="10.9929in" svg:height="0.6528in" svg:x="0in" svg:y="0.0555in">
              <draw:text-box>
                <text:p text:style-name="P1"><text:span text:style-name="T1">Alternativa C - Razvoj vlastitog informacijskog sustava (SOFS)</text:span><text:span text:style-name="T1"><text:line-break/></text:span><text:span text:style-name="T1">Razvija se vlastiti informacijski sustav prilagođen potrebama fitness studija koji omogućuje upravljanje članovima, trenerima, terminima i rezervacijama.</text:span></text:p>
              </draw:text-box>
            </draw:frame>
          </table:table-cell>
          <table:table-cell table:number-columns-repeated="16383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>
            <draw:frame draw:z-index="4" draw:name="TekstniOkvir 6" draw:style-name="gr1" draw:text-style-name="P2" svg:width="8.2016in" svg:height="2.1807in" svg:x="0.0902in" svg:y="0.1528in">
              <draw:text-box>
                <text:p text:style-name="P1"><text:span text:style-name="T2">Kriteriji vrednovanja</text:span></text:p>
                <text:p text:style-name="P1"><text:span text:style-name="T1">Za usporedbu alternativa definirano je 7 ključnih kriterija:</text:span></text:p>
                <text:p text:style-name="P1"><text:span text:style-name="T1">1. Trošak implementacije</text:span></text:p>
                <text:p text:style-name="P1"><text:span text:style-name="T1">2. Trošak održavanja</text:span></text:p>
                <text:p text:style-name="P1"><text:span text:style-name="T1">3. Prilagodljivost potrebama studija</text:span></text:p>
                <text:p text:style-name="P1"><text:span text:style-name="T1">4. Jednostavnost korištenja</text:span></text:p>
                <text:p text:style-name="P1"><text:span text:style-name="T1">5. Kontrola nad podacima</text:span></text:p>
                <text:p text:style-name="P1"><text:span text:style-name="T1">6. Mogućnost proširenja sustava</text:span></text:p>
                <text:p text:style-name="P1"><text:span text:style-name="T1">7. Pouzdanost i preglednost rada</text:span></text:p>
                <text:p text:style-name="P1"><text:span text:style-name="T1"/></text:p>
                <text:p text:style-name="P1"><text:span text:style-name="T1">Ocjena: 1 (loše) - 5 (odlično)</text:span></text:p>
                <text:p text:style-name="P1"><text:span text:style-name="T1"/></text:p>
              </draw:text-box>
            </draw:frame>
          </table:table-cell>
          <table:table-cell table:number-columns-repeated="16383"/>
        </table:table-row>
        <table:table-row table:style-name="ro1" table:number-rows-repeated="12">
          <table:table-cell table:number-columns-repeated="16384"/>
        </table:table-row>
        <table:table-row table:style-name="ro1">
          <table:table-cell office:value-type="string" calcext:value-type="string">
            <text:p>Kriterij</text:p>
          </table:table-cell>
          <table:table-cell office:value-type="string" calcext:value-type="string">
            <text:p>Težina</text:p>
          </table:table-cell>
          <table:table-cell office:value-type="string" calcext:value-type="string">
            <text:p>Alternativa A</text:p>
          </table:table-cell>
          <table:table-cell office:value-type="string" calcext:value-type="string">
            <text:p>Alternativa B</text:p>
          </table:table-cell>
          <table:table-cell office:value-type="string" calcext:value-type="string">
            <text:p>Alternativa C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rošak implementacije</text:p>
          </table:table-cell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rošak održavanja</text:p>
          </table:table-cell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rilagodljivost</text:p>
          </table:table-cell>
          <table:table-cell office:value-type="float" office:value="0.15" calcext:value-type="float">
            <text:p>0.1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Jednostavnost korištenja</text:p>
          </table:table-cell>
          <table:table-cell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ontrola nad podacima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ogućnost proširenja</text:p>
          </table:table-cell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ouzdanost</text:p>
          </table:table-cell>
          <table:table-cell office:value-type="float" office:value="0.15" calcext:value-type="float">
            <text:p>0.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6379"/>
        </table:table-row>
        <table:table-row table:style-name="ro1" table:number-rows-repeated="2">
          <table:table-cell table:number-columns-repeated="16384"/>
        </table:table-row>
        <table:table-row table:style-name="ro2">
          <table:table-cell table:style-name="ce6" office:value-type="string" calcext:value-type="string">
            <text:p>Alternativa</text:p>
          </table:table-cell>
          <table:table-cell table:style-name="ce6" office:value-type="string" calcext:value-type="string">
            <text:p>Ukupna ocjena</text:p>
          </table:table-cell>
          <table:table-cell table:number-columns-repeated="16382"/>
        </table:table-row>
        <table:table-row table:style-name="ro2">
          <table:table-cell table:style-name="ce3" office:value-type="string" calcext:value-type="string">
            <text:p>A - Ručno vođenje</text:p>
          </table:table-cell>
          <table:table-cell table:style-name="ce3" office:value-type="float" office:value="3.05" calcext:value-type="float">
            <text:p>3.05</text:p>
          </table:table-cell>
          <table:table-cell table:number-columns-repeated="16382"/>
        </table:table-row>
        <table:table-row table:style-name="ro2">
          <table:table-cell table:style-name="ce3" office:value-type="string" calcext:value-type="string">
            <text:p>B - Komercijalni softver</text:p>
          </table:table-cell>
          <table:table-cell table:style-name="ce3" office:value-type="float" office:value="3.25" calcext:value-type="float">
            <text:p>3.25</text:p>
          </table:table-cell>
          <table:table-cell table:number-columns-repeated="16382"/>
        </table:table-row>
        <table:table-row table:style-name="ro2">
          <table:table-cell table:style-name="ce3" office:value-type="string" calcext:value-type="string">
            <text:p>C - Vlastiti sustav</text:p>
          </table:table-cell>
          <table:table-cell table:style-name="ce4" office:value-type="float" office:value="4.2" calcext:value-type="float">
            <text:p>4.2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>
            <draw:frame draw:z-index="5" draw:name="TekstniOkvir 7" draw:style-name="gr1" draw:text-style-name="P2" svg:width="5.3957in" svg:height="0.6807in" svg:x="0in" svg:y="0.0071in">
              <draw:text-box>
                <text:p text:style-name="P1"><text:span text:style-name="T1">Najbolje ocijenjena alternativa je razvoj vlastitog informacijskog sustava jer omogućuje potpunu prilagodbu potrebama fitness studija, veću kontrolu nad podacima i mogućnost budućeg proširenja funkcionalnosti.</text:span></text:p>
              </draw:text-box>
            </draw:frame>
          </table:table-cell>
          <table:table-cell table:number-columns-repeated="16383"/>
        </table:table-row>
        <table:table-row table:style-name="ro3" table:number-rows-repeated="1048531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  <table:database-ranges>
        <table:database-range table:name="Tablica2" table:target-range-address="List1.A29:List1.E36" table:display-filter-buttons="true"/>
        <table:database-range table:name="Tablica3" table:target-range-address="List1.A39:List1.B42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ptos Narrow" svg:font-family="'Aptos Narrow'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draw:stroke="solid" svg:stroke-width="0.0209in" svg:stroke-color="#042433" draw:stroke-linejoin="miter" svg:stroke-linecap="butt" draw:fill-color="#156082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ptos Narrow" fo:font-family="'Aptos Narrow'" fo:font-size="11pt" style:font-name-asian="Aptos Narrow" style:font-family-asian="'Aptos Narrow'" style:font-size-asian="11pt" style:font-name-complex="Aptos Narrow" style:font-family-complex="'Aptos Narrow'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M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4.2$MacOSX_AARCH64 LibreOffice_project/85569322deea74ec9134968a29af2df5663baa21</meta:generator>
    <meta:initial-creator>Klara Zaninovic</meta:initial-creator>
    <meta:creation-date>2026-03-13T16:03:37Z</meta:creation-date>
    <dc:date>2026-03-20T11:05:48.143377266</dc:date>
    <meta:editing-duration>PT58S</meta:editing-duration>
    <meta:editing-cycles>2</meta:editing-cycles>
    <meta:document-statistic meta:table-count="1" meta:cell-count="48" meta:object-count="6"/>
  </office:meta>
</office:document-meta>
</file>