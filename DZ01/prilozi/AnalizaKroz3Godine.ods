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383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gr1" style:family="graphic">
      <style:graphic-properties draw:stroke="solid" svg:stroke-width="0.0102in" svg:stroke-color="#bcbcbc" svg:stroke-opacity="100%" draw:fill="solid" draw:fill-color="#ffffff" draw:opacity="100%" draw:textarea-horizontal-align="left" draw:textarea-vertical-align="top" draw:auto-grow-height="false" draw:auto-grow-width="false" fo:padding-top="0.05in" fo:padding-bottom="0.05in" fo:padding-left="0.1in" fo:padding-right="0.1in" fo:wrap-option="wrap"/>
      <style:paragraph-properties style:font-independent-line-spacing="false"/>
    </style:style>
    <style:style style:name="P1" style:family="paragraph">
      <style:paragraph-properties fo:margin-left="0in" fo:margin-right="0in" fo:margin-top="0in" fo:margin-bottom="0in" fo:line-height="100%" fo:text-indent="0in" style:punctuation-wrap="hanging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3" style:family="paragraph">
      <style:paragraph-properties fo:margin-left="0.25in" fo:margin-right="0in" fo:margin-top="0in" fo:margin-bottom="0in" fo:line-height="100%" fo:text-indent="-0.25in" style:punctuation-wrap="hanging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table:table-column table:style-name="co1" table:number-columns-repeated="16384" table:default-cell-style-name="ce1"/>
        <table:table-row table:style-name="ro1">
          <table:table-cell>
            <draw:frame draw:z-index="0" draw:name="TekstniOkvir 1" draw:style-name="gr1" draw:text-style-name="P2" svg:width="3.9028in" svg:height="0.2638in" svg:x="0in" svg:y="0.0071in">
              <draw:text-box>
                <text:p text:style-name="P1"><text:span text:style-name="T1">Analiza je provedena za razdoblje od 3 godine.</text:span></text:p>
              </draw:text-box>
            </draw:fram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>
            <draw:frame draw:z-index="1" draw:name="TekstniOkvir 2" draw:style-name="gr1" draw:text-style-name="P2" svg:width="3.3264in" svg:height="1.8126in" svg:x="0in" svg:y="0.0138in">
              <draw:text-box>
                <text:p text:style-name="P1"><text:span text:style-name="T2">Ključni troškovi</text:span></text:p>
                <text:p text:style-name="P3"><text:span text:style-name="T1">razvoj sustava</text:span></text:p>
                <text:p text:style-name="P3"><text:span text:style-name="T1">vrijeme programiranja i testiranja</text:span></text:p>
                <text:p text:style-name="P3"><text:span text:style-name="T1">trošak održavanja sustava</text:span></text:p>
                <text:p text:style-name="P3"><text:span text:style-name="T1">trošak infrastrukture (računala, hosting)</text:span></text:p>
                <text:p text:style-name="P3"><text:span text:style-name="T1">obuka korisnika</text:span></text:p>
                <text:p text:style-name="P3"><text:span text:style-name="T1">administracija sustava</text:span></text:p>
                <text:p text:style-name="P3"><text:span text:style-name="T1">nadogradnje sustava</text:span></text:p>
                <text:p text:style-name="P1"><text:span text:style-name="T2"/></text:p>
              </draw:text-box>
            </draw:frame>
          </table:table-cell>
          <table:table-cell table:number-columns-repeated="5"/>
          <table:table-cell>
            <draw:frame draw:z-index="2" draw:name="TekstniOkvir 3" draw:style-name="gr1" draw:text-style-name="P2" svg:width="3.2709in" svg:height="1.8055in" svg:x="0in" svg:y="0.0138in">
              <draw:text-box>
                <text:p text:style-name="P1"><text:span text:style-name="T2">Ključne koristi</text:span></text:p>
                <text:p text:style-name="P3"><text:span text:style-name="T1">smanjenje administrativnog vremena</text:span></text:p>
                <text:p text:style-name="P3"><text:span text:style-name="T1">manji broj pogrešaka u rezervacijama</text:span></text:p>
                <text:p text:style-name="P3"><text:span text:style-name="T1">bolja iskorištenost termina</text:span></text:p>
                <text:p text:style-name="P3"><text:span text:style-name="T1">brži pristup informacijama</text:span></text:p>
                <text:p text:style-name="P3"><text:span text:style-name="T1">bolja organizacija rada trenera</text:span></text:p>
                <text:p text:style-name="P3"><text:span text:style-name="T1">povećano zadovoljstvo članova</text:span></text:p>
                <text:p text:style-name="P3"><text:span text:style-name="T1">mogućnost buduće digitalizacije poslovanja</text:span></text:p>
                <text:p text:style-name="P1"><text:span text:style-name="T1"/></text:p>
              </draw:text-box>
            </draw:frame>
          </table:table-cell>
          <table:table-cell table:number-columns-repeated="16377"/>
        </table:table-row>
        <table:table-row table:style-name="ro1" table:number-rows-repeated="9">
          <table:table-cell table:number-columns-repeated="16384"/>
        </table:table-row>
        <table:table-row table:style-name="ro2">
          <table:table-cell table:style-name="ce2" office:value-type="string" calcext:value-type="string">
            <text:p>Godina</text:p>
          </table:table-cell>
          <table:table-cell table:style-name="ce2" office:value-type="string" calcext:value-type="string">
            <text:p>Troškovi</text:p>
          </table:table-cell>
          <table:table-cell table:style-name="ce2" office:value-type="string" calcext:value-type="string">
            <text:p>Koristi</text:p>
          </table:table-cell>
          <table:table-cell/>
          <table:table-cell>
            <draw:frame draw:z-index="3" draw:name="TekstniOkvir 4" draw:style-name="gr1" draw:text-style-name="P2" svg:width="2.25in" svg:height="0.278in" svg:x="0in" svg:y="0in">
              <draw:text-box>
                <text:p text:style-name="P1"><text:span text:style-name="T1">Procjena troškova i koristi (EUR)</text:span></text:p>
              </draw:text-box>
            </draw:frame>
          </table:table-cell>
          <table:table-cell table:number-columns-repeated="163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63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>
            <text:p>Godina</text:p>
          </table:table-cell>
          <table:table-cell table:style-name="ce2" office:value-type="string" calcext:value-type="string">
            <text:p>Neto korist</text:p>
          </table:table-cell>
          <table:table-cell table:number-columns-repeated="1638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-1000" calcext:value-type="float">
            <text:p>-1000</text:p>
          </table:table-cell>
          <table:table-cell table:number-columns-repeated="2"/>
          <table:table-cell>
            <draw:frame draw:z-index="4" draw:name="TekstniOkvir 5" draw:style-name="gr1" draw:text-style-name="P2" svg:width="2.1457in" svg:height="0.3055in" svg:x="0.0138in" svg:y="0in">
              <draw:text-box>
                <text:p text:style-name="P1"><text:span text:style-name="T1">Neto vrijednost po godinama</text:span></text:p>
              </draw:text-box>
            </draw:frame>
          </table:table-cell>
          <table:table-cell table:number-columns-repeated="1637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400" calcext:value-type="float">
            <text:p>1400</text:p>
          </table:table-cell>
          <table:table-cell table:number-columns-repeated="1638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900" calcext:value-type="float">
            <text:p>19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5" draw:name="TekstniOkvir 6" draw:style-name="gr1" draw:text-style-name="P2" svg:width="5.5972in" svg:height="1.1181in" svg:x="0.0071in" svg:y="0.1874in">
              <draw:text-box>
                <text:p text:style-name="P1"><text:span text:style-name="T1">Iako su početni troškovi razvoja sustava veći u prvoj godini, u sljedećim godinama sustav donosi značajne koristi kroz smanjenje administrativnog rada, bolju organizaciju termina i povećanu učinkovitost poslovanja fitness studija.</text:span></text:p>
                <text:p text:style-name="P1"><text:span text:style-name="T1">Ukupno gledano, projekt pokazuje pozitivnu ekonomsku opravdanost u promatranom razdoblju.</text:span></text:p>
                <text:p text:style-name="P1"><text:span text:style-name="T1"/></text:p>
              </draw:text-box>
            </draw:frame>
          </table:table-cell>
          <table:table-cell table:number-columns-repeated="16383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MacOSX_AARCH64 LibreOffice_project/85569322deea74ec9134968a29af2df5663baa21</meta:generator>
    <meta:initial-creator>Klara Zaninovic</meta:initial-creator>
    <meta:creation-date>2026-03-13T17:35:36Z</meta:creation-date>
    <dc:date>2026-03-20T11:06:53.310675163</dc:date>
    <meta:editing-duration>PT43S</meta:editing-duration>
    <meta:editing-cycles>1</meta:editing-cycles>
    <meta:document-statistic meta:table-count="1" meta:cell-count="20" meta:object-count="6"/>
  </office:meta>
</office:document-meta>
</file>